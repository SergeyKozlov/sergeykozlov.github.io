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c56c"/>
    </style:style>
    <style:style style:name="T3" style:family="text">
      <style:text-properties officeooo:rsid="0018b9ee"/>
    </style:style>
    <style:style style:name="T4" style:family="text">
      <style:text-properties officeooo:rsid="0015191b"/>
    </style:style>
    <style:style style:name="T5" style:family="text">
      <style:text-properties officeooo:rsid="001cfee6"/>
    </style:style>
    <style:style style:name="T6" style:family="text">
      <style:text-properties officeooo:rsid="002344fa"/>
    </style:style>
    <style:style style:name="T7" style:family="text">
      <style:text-properties officeooo:rsid="0025d3db"/>
    </style:style>
    <style:style style:name="T8" style:family="text">
      <style:text-properties officeooo:rsid="00260c04"/>
    </style:style>
    <style:style style:name="T9" style:family="text">
      <style:text-properties officeooo:rsid="0028cdd0"/>
    </style:style>
    <style:style style:name="T10" style:family="text">
      <style:text-properties officeooo:rsid="002da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evOps, data infrastructure, or platform engineering roles</text:span></text:p>
      <text:p text:style-name="Standard">We had to deploy new Apache Flink releases for real-time data processing jobs where each job ran on its own dedicated server.</text:p>
      <text:p text:style-name="Standard">I needed to automate the release process so that each Flink job was deployed correctly to its specific server without manual work.</text:p>
      <text:p text:style-name="Standard">I created Ansible <text:span text:style-name="T2">role and</text:span> playbooks and connected them with Jenkins <text:span text:style-name="T3">job</text:span> to deploy each Flink job to the right server based on its configuration.</text:p>
      <text:p text:style-name="Standard">As a result, releases became faster, more reliable, and each job was always deployed to the correct server without mistakes.</text:p>
      <text:p text:style-name="Standard"/>
      <text:p text:style-name="Standard"/>
      <text:p text:style-name="P1">Apache Kafka</text:p>
      <text:p text:style-name="Standard">In my current role as a Lead DevOps Engineer, I work on a real-time fraud detection platform where Kafka handles a very large stream of events.</text:p>
      <text:p text:style-name="Standard">We noticed that it was sometimes hard to quickly understand what was happening inside the Kafka clusters when issues appeared, so I was asked to improve visibility and monitoring.</text:p>
      <text:p text:style-name="Standard">To do that, I connected Kafka metrics to our Prometheus and Grafana stack. I set up exporters <text:span text:style-name="T4">(JMX Exporter and Kafka Lag Exporter)</text:span> and started collecting key signals like broker health, consumer lag, throughput, and overall cluster performance. Then I built dashboards and alerts so the team could see problems early instead of discovering them during incidents.</text:p>
      <text:p text:style-name="Standard">As a result, we got much better visibility into Kafka health, and troubleshooting became faster and more straightforward, especially under high load.</text:p>
      <text:p text:style-name="Standard"/>
      <text:p text:style-name="Standard">Strong experience with <text:span text:style-name="T1">Microsoft Azure cloud platform</text:span></text:p>
      <text:p text:style-name="Standard">At my previous job, we needed to move users from on-prem Active Directory to Azure Entra.</text:p>
      <text:p text:style-name="Standard">My task was to make sure all users could log in safely using Azure Entra without breaking access to company systems.</text:p>
      <text:p text:style-name="Standard">I prepared the migration plan, synced accounts to Azure Entra, and using Microsoft Entra Connect to create a hybrid identity environment.</text:p>
      <text:p text:style-name="Standard">After the change, users were able to sign in with Azure Entra smoothly and we reduced login issues and support requests.</text:p>
      <text:p text:style-name="Standard"/>
      <text:p text:style-name="Standard">Solid understanding of <text:span text:style-name="T1">distributed systems and event-driven architectures</text:span></text:p>
      <text:p text:style-name="Standard">The company needed to process real-time data from a new Kafka cluster for fraud detection in a distributed system.</text:p>
      <text:p text:style-name="Standard">I was involved in connecting the new Kafka cluster to an Apache Flink streaming pipeline to ensure <text:span text:style-name="T5">real-time</text:span> data flow.</text:p>
      <text:p text:style-name="Standard">I configured Kafka topics and Flink jobs, worked with ZooKeeper coordination, and tested event processing to make sure data was flowing correctly.</text:p>
      <text:p text:style-name="Standard"><text:span text:style-name="T5">As a result, t</text:span>he system started to reliably process millions of events per second and <text:span text:style-name="T5">implement new feature of</text:span> real-time fraud detection.</text:p>
      <text:p text:style-name="Standard"/>
      <text:p text:style-name="Standard"/>
      <text:p text:style-name="Standard">Experience with <text:span text:style-name="T1">containerization and orchestration</text:span><text:span text:style-name="T1"> (Docker, Kubernetes)</text:span></text:p>
      <text:p text:style-name="Standard">We had applications running in Kubernetes/OpenShift that needed to run on a regular schedule.</text:p>
      <text:p text:style-name="Standard">I needed to improve the OpenShift Helm charts to support scheduled execution of these workloads.</text:p>
      <text:p text:style-name="Standard">I updated the Helm charts and added OpenShift CronJobs to run the jobs automatically inside the cluster.</text:p>
      <text:p text:style-name="Standard">This made deployments fully automated for scheduled tasks and reduced manual work and mistakes.</text:p>
      <text:p text:style-name="Standard"><text:soft-page-break/></text:p>
      <text:p text:style-name="Standard">Proficiency in <text:span text:style-name="T1">Infrastructure as Code</text:span><text:span text:style-name="T1"> (Terraform, ARM templates, or similar)</text:span></text:p>
      <text:p text:style-name="Standard">In my DevOps work, we needed a consistent and repeatable way to manage enterprise<text:span text:style-name="T6"> </text:span>cloud infrastructure using Infrastructure as Code.</text:p>
      <text:p text:style-name="Standard">My task was to create and maintain infrastructure in the cloud using Terraform.</text:p>
      <text:p text:style-name="Standard">I initialized the Terraform project, <text:span text:style-name="T6">corrected</text:span> configuration files, and used apply to create and update resources <text:span text:style-name="T6">for new PostgreSQL cluster</text:span>.</text:p>
      <text:p text:style-name="Standard">As a result, infrastructure deployment became more consistent, reliable, and easier to manage across environments.</text:p>
      <text:p text:style-name="Standard"/>
      <text:p text:style-name="P1">Strong scripting/programming skills (Python, Bash, or similar)</text:p>
      <text:p text:style-name="Standard">A few days ago, I needed to <text:span text:style-name="T7">collect </text:span>and update secrets stored in SecMan for multiple services.</text:p>
      <text:p text:style-name="Standard">I had to automate the process of retrieving and rotating these secrets in a safe and reliable way.</text:p>
      <text:p text:style-name="Standard">I wrote a Python script that connected to SecMan API and performed scheduled secret <text:span text:style-name="T8">gathering</text:span> and updates.</text:p>
      <text:p text:style-name="Standard">This reduced manual work and made secret management faster, safer, and more consistent.</text:p>
      <text:p text:style-name="Standard"/>
      <text:p text:style-name="P1">Experience building and managing CI/CD pipelines (GitLab CI/CD, GitHub Actions, etc.)</text:p>
      <text:p text:style-name="Standard">In my role at a large banking company, we needed a stable CI/CD process for Java applications.</text:p>
      <text:p text:style-name="Standard">I was responsible for building and managing Jenkins pipelines for build, test, and release.</text:p>
      <text:p text:style-name="Standard">I created pipelines that compiled jar files, ran tests, checked code quality with SonarQube quality gates, and deployed releases to production.</text:p>
      <text:p text:style-name="Standard">This reduced deployment time and made releases faster and more reliable.</text:p>
      <text:p text:style-name="Standard"/>
      <text:p text:style-name="P1">Hands-on experience with monitoring and observability tools (Prometheus, Grafana, ELK stack, etc.)</text:p>
      <text:p text:style-name="Standard"><text:span text:style-name="T9">In my role, </text:span>I responsible for implementing end-to-end monitoring of Kafka infrastructure, including system health and performance metrics such as CPU <text:span text:style-name="T9">utilization</text:span>, memory, disk usage, and network activity.</text:p>
      <text:p text:style-name="Standard">I needed to build clear observability so we could quickly identify performance issues and prevent potential downtime.</text:p>
      <text:p text:style-name="Standard">I used Prometheus and Grafana (and Zabbix for alerts) to collect metrics and create Grafana dashboards for all key Kafka components.</text:p>
      <text:p text:style-name="Standard">As a result, we significantly improved system visibility, reduced incident investigation time, and enabled proactive detection of performance bottlenecks before they impacted production.</text:p>
      <text:p text:style-name="Standard"/>
      <text:p text:style-name="P1">Understanding of data pipelines, streaming ETL, and real-time processing frameworks</text:p>
      <text:p text:style-name="Standard">I was involved in supporting a high-throughput fraud analytics platform that required real-time enrichment of streaming data from multiple sources.</text:p>
      <text:p text:style-name="Standard">Our task was to implement and improve a streaming ETL pipeline <text:span text:style-name="T10">confident</text:span> of processing millions of events per second while enriching the data before storage and analysis.</text:p>
      <text:p text:style-name="Standard">I was involved in developing and operating a pipeline that processed Apache Flink streams, coordinated through ZooKeeper, enriched events using NF agents, and delivered the results into ClickHouse for analytical queries.</text:p>
      <text:p text:style-name="Standard">The solution enabled reliable real-time processing of more than 8–9 million events per second and improved the availability of enriched data for fraud detection and operational analytic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20:33:04.295102738</meta:creation-date>
    <dc:date>2026-05-05T00:36:41.637474914</dc:date>
    <meta:editing-duration>PT3H30M46S</meta:editing-duration>
    <meta:editing-cycles>21</meta:editing-cycles>
    <meta:generator>LibreOffice/25.8.6.2$Linux_X86_64 LibreOffice_project/580$Build-2</meta:generator>
    <meta:document-statistic meta:table-count="0" meta:image-count="0" meta:object-count="0" meta:page-count="2" meta:paragraph-count="50" meta:word-count="917" meta:character-count="6009" meta:non-whitespace-character-count="5143"/>
  </office:meta>
</office:document-meta>
</file>