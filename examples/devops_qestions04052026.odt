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091f"/>
    </style:style>
    <style:style style:name="T3" style:family="text">
      <style:text-properties officeooo:rsid="002a8518"/>
    </style:style>
    <style:style style:name="T4" style:family="text">
      <style:text-properties fo:font-weight="bold" officeooo:rsid="00679fb0" style:font-weight-asian="bold" style:font-weight-complex="bold"/>
    </style:style>
    <style:style style:name="T5" style:family="text">
      <style:text-properties fo:font-weight="bold" officeooo:rsid="002c155e" style:font-weight-asian="bold" style:font-weight-complex="bold"/>
    </style:style>
    <style:style style:name="T6" style:family="text">
      <style:text-properties officeooo:rsid="002c155e"/>
    </style:style>
    <style:style style:name="T7" style:family="text">
      <style:text-properties officeooo:rsid="006b8ab9"/>
    </style:style>
    <style:style style:name="T8" style:family="text">
      <style:text-properties officeooo:rsid="006d39dd"/>
    </style:style>
    <style:style style:name="T9" style:family="text">
      <style:text-properties officeooo:rsid="006c11ed"/>
    </style:style>
    <style:style style:name="T10" style:family="text">
      <style:text-properties officeooo:rsid="0033652c"/>
    </style:style>
    <style:style style:name="T11" style:family="text">
      <style:text-properties officeooo:rsid="003ac35c"/>
    </style:style>
    <style:style style:name="T12" style:family="text">
      <style:text-properties officeooo:rsid="003d6c88"/>
    </style:style>
    <style:style style:name="T13" style:family="text">
      <style:text-properties officeooo:rsid="00440df3"/>
    </style:style>
    <style:style style:name="T14" style:family="text">
      <style:text-properties officeooo:rsid="0044d4a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5f46d8"/>
    </style:style>
    <style:style style:name="T17" style:family="text">
      <style:text-properties fo:font-weight="bold" officeooo:rsid="00495606" style:font-weight-asian="bold" style:font-weight-complex="bold"/>
    </style:style>
    <style:style style:name="T18" style:family="text">
      <style:text-properties officeooo:rsid="00495606"/>
    </style:style>
    <style:style style:name="T19" style:family="text">
      <style:text-properties fo:font-weight="bold" officeooo:rsid="0049d97e" style:font-weight-asian="bold" style:font-weight-complex="bold"/>
    </style:style>
    <style:style style:name="T20" style:family="text">
      <style:text-properties officeooo:rsid="0049d97e"/>
    </style:style>
    <style:style style:name="T21" style:family="text">
      <style:text-properties officeooo:rsid="004d89ee"/>
    </style:style>
    <style:style style:name="T22" style:family="text">
      <style:text-properties officeooo:rsid="00708587"/>
    </style:style>
    <style:style style:name="T23" style:family="text">
      <style:text-properties officeooo:rsid="004ee5da"/>
    </style:style>
    <style:style style:name="T24" style:family="text">
      <style:text-properties officeooo:rsid="004fe52a"/>
    </style:style>
    <style:style style:name="T25" style:family="text">
      <style:text-properties officeooo:rsid="00515f0a"/>
    </style:style>
    <style:style style:name="T26" style:family="text">
      <style:text-properties officeooo:rsid="0052f607"/>
    </style:style>
    <style:style style:name="T27" style:family="text">
      <style:text-properties officeooo:rsid="00586bfd"/>
    </style:style>
    <style:style style:name="T28" style:family="text">
      <style:text-properties officeooo:rsid="001bd7aa"/>
    </style:style>
    <style:style style:name="T29" style:family="text">
      <style:text-properties officeooo:rsid="001f19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Tell me about a <text:span text:style-name="T1">complex platform you support</text:span>.</text:p>
      <text:p text:style-name="Standard">I’m a Lead DevOps engineer working on a real-time banking data platform built around Kafka-based event streaming.</text:p>
      <text:p text:style-name="Standard">We operate multiple Kafka clusters processing over 9 million events per second, feeding streaming pipelines with <text:span text:style-name="T2">Apache </text:span>Flink and ClickHouse for fraud detection and analytics.</text:p>
      <text:p text:style-name="Standard">My focus is keeping the Kafka ecosystem reliable and scalable — monitoring clusters, resolving incidents, analyzing consumer lag, and automating infrastructure and CI/CD workflows to support high-load mission-critical production system<text:span text:style-name="T3">s</text:span>.</text:p>
      <text:p text:style-name="Standard"/>
      <text:p text:style-name="Standard"/>
      <text:p text:style-name="Standard"><text:span text:style-name="T1">Kafka - <text:s/></text:span><text:span text:style-name="T4">producer -</text:span><text:span text:style-name="T1"> consumer – broker <text:s/>– </text:span><text:span text:style-name="T4">topic –&gt; partition – zookeeper -</text:span><text:span text:style-name="T1"> </text:span><text:span text:style-name="T5">ACL</text:span><text:span text:style-name="T6"> - </text:span><text:span text:style-name="T7">(key + metadata)</text:span></text:p>
      <text:p text:style-name="P1">experience / responsibility</text:p>
      <text:p text:style-name="Standard">operations, planning <text:span text:style-name="T8">(</text:span><text:span text:style-name="T9">quorum election</text:span><text:span text:style-name="T8">)</text:span>, and cluster migration activities, maintaining reliability of multiple Kafka clusters in production, including monitoring, replication, lag analysis, incident response, supporting infrastructure changes.</text:p>
      <text:p text:style-name="P1">Migration</text:p>
      <text:p text:style-name="Standard">involved planning, including dependency analysis, capacity checks, risk assessment, monitoring readiness, rollback planning, and team coordination.</text:p>
      <text:p text:style-name="P1">Risks</text:p>
      <text:p text:style-name="Standard">data loss, offset issues, ACL or topic configuration mistakes, producer and consumer compatibility problems, DNS/bootstrap changes, replication delays, and rollback complexity.</text:p>
      <text:p text:style-name="P1">lag is growing</text:p>
      <text:p text:style-name="Standard">broker health, consumer group lag, consumer throughput, Flink jobs, downstream systems CH, infrastructure changes.</text:p>
      <text:p text:style-name="P1">under-replicated partitions</text:p>
      <text:p text:style-name="Standard">replicas are not fully synchronized <text:span text:style-name="T10">+ reduces fault tolerance and increases the risk during broker failure.</text:span></text:p>
      <text:p text:style-name="P1">number of partitions</text:p>
      <text:p text:style-name="Standard">consumer parallelism, ordering requirements, future growth, broker capacity, and operational overhead.</text:p>
      <text:p text:style-name="P1">protect Kafka from data loss</text:p>
      <text:p text:style-name="Standard">ISR monitoring, safe producer settings such as <text:span text:style-name="Source_20_Text">acks=all</text:span>, retention control, monitoring, backup or DR planning, and tested recovery procedures.</text:p>
      <text:p text:style-name="Standard"/>
      <text:p text:style-name="P1">Azure</text:p>
      <text:p text:style-name="P1">experience / responsibility</text:p>
      <text:p text:style-name="Standard">Azure-related identity and access practices including Microsoft Entra ID, Azure RBAC, MFA, and SCEPman <text:span text:style-name="T11">(certificate)</text:span> on Azure. <text:line-break/>I have practical experience with Azhur in my previous job and now I maintain my practical knowledge with the help of Microsoft courses.</text:p>
      <text:p text:style-name="P1">design secure access in Azure</text:p>
      <text:p text:style-name="Standard">least privilege, Conditional Access, <text:s/>MFA</text:p>
      <text:p text:style-name="Standard">cloud-native data infrastructure on Azure</text:p>
      <text:p text:style-name="Standard">microservices, <text:span text:style-name="T12">K8S </text:span>(AKS) <text:span text:style-name="T12">, </text:span>Event Hubs or Kafka-compatible platforms, <text:span text:style-name="T12">IaC </text:span>Terraform or ARM/Bicep templates. Azure Monitor, Log Analytics, Key Vault. Data Factory, Stream Analytics, or Spark-based platforms</text:p>
      <text:p text:style-name="Standard"/>
      <text:p text:style-name="P1">Terraform / IaC</text:p>
      <text:p text:style-name="Standard">practical understanding and exposure to Terraform-style IaC workflows, <text:span text:style-name="T13">and</text:span> my strongest hands-on automation experience is with Ansible, Jenkins, Git, Python, and Shell</text:p>
      <text:p text:style-name="Standard"><text:span text:style-name="T1">Terraform state</text:span> - <text:s/>current infrastructure mapping - <text:s/>must be protected.</text:p>
      <text:p text:style-name="Standard"><text:span text:style-name="T1">configuration drift</text:span> – <text:span text:style-name="T14">reduce by </text:span>using Git-based changes, code reviews, terraform plan.</text:p>
      <text:p text:style-name="Standard"><text:span text:style-name="Strong_20_Emphasis">multiple environments </text:span><text:span text:style-name="Strong_20_Emphasis"><text:span text:style-name="T15">- <text:s/>separate environments such as dev, stage, and production using variables, modules.</text:span></text:span></text:p>
      <text:p text:style-name="Standard"><text:soft-page-break/></text:p>
      <text:p text:style-name="P1">High Availability (HA), Fault Tolerance (FT) и Disaster Recovery (DR)</text:p>
      <text:p text:style-name="Standard"><text:span text:style-name="T16">I</text:span> design <text:span text:style-name="T1">DR</text:span> around <text:span text:style-name="T1">RPO</text:span>, <text:span text:style-name="T1">RTO</text:span>, replication, geo-redundancy, failover procedures, monitoring, runbooks, and tested recovery scenarios.</text:p>
      <text:p text:style-name="Standard"><text:span text:style-name="T17">HA</text:span><text:span text:style-name="T18"> - </text:span>multi-node and multi-zone deployments</text:p>
      <text:p text:style-name="Standard"><text:span text:style-name="T17">FT</text:span><text:span text:style-name="T18"> - </text:span>data replication, Kafka provides replication across brokers. ClickHouse, <text:span text:style-name="T18">PostgreSQL - </text:span>streaming replication. <text:span text:style-name="T18">K8S - </text:span>failed pods are automatically rescheduled <text:span text:style-name="T18">+ </text:span>service mesh (Istio).</text:p>
      <text:p text:style-name="Standard"><text:span text:style-name="T19">DR</text:span><text:span text:style-name="T20"> - </text:span>multi-region or multi–data center architectures. automated backups, snapshot strategies, and tested restore procedures. runbooks with defined RPO/RTO targets.</text:p>
      <text:p text:style-name="Standard"><text:span text:style-name="T1">Monitoring and Prevention</text:span> - Prometheus, Grafana, Zabbix, and ELK stack.</text:p>
      <text:p text:style-name="Standard"><text:span text:style-name="Strong_20_Emphasis">test failover</text:span><text:span text:style-name="Strong_20_Emphasis"><text:span text:style-name="T15"> - <text:s/>with planned scenarios, controlled impact, clear success criteria, monitoring validation.</text:span></text:span></text:p>
      <text:p text:style-name="Standard"/>
      <text:p text:style-name="Standard"/>
      <text:p text:style-name="P1">Observability</text:p>
      <text:p text:style-name="Standard">Prometheus, Grafana, Zabbix, and ELK stack <text:span text:style-name="T21">for</text:span> logs, metrics, alerts, dashboards, and business-level event latency into one end-to-end observability view. <text:s/>ELK for centralized log analysis from ..</text:p>
      <text:p text:style-name="Standard"/>
      <text:p text:style-name="P1">CI/CD and Automation</text:p>
      <text:p text:style-name="Standard">I have built, <text:span text:style-name="T22">implement </text:span>and supported CI/CD pipelines with Jenkins, Groovy, Git, Ansible, Python, and Shell for safer and faster production delivery.</text:p>
      <text:p text:style-name="Standard"><text:span text:style-name="T1">rollback strategy</text:span> - <text:s/>define rollback steps before deployment, validate previous versions, monitor impact, and restore service safely if needed</text:p>
      <text:p text:style-name="Standard"/>
      <text:p text:style-name="Standard">Define and enforce security, compliance, and data protection standards across infrastructure</text:p>
      <text:p text:style-name="Standard"><text:span text:style-name="T1">Define</text:span> - IAM policies, network segmentation, encryption at rest/in transit, data classification <text:span text:style-name="T23">in </text:span>IaC Terraform.</text:p>
      <text:p text:style-name="Standard"><text:span text:style-name="T1">Enforce</text:span> - CI/CD (Jenkins/GitHub Actions) с security gates (SonarQube, policy checks), <text:span text:style-name="T24">configuration control </text:span>Ansible/IaC.</text:p>
      <text:p text:style-name="Standard"><text:span text:style-name="T1">Data protection</text:span> – SecMan/Vault, KMS, <text:span text:style-name="T25">access control </text:span>IAM, RBAC <text:span text:style-name="T25">in</text:span> K<text:span text:style-name="T25">8S</text:span>/OpenShift. <text:span text:style-name="T26">Network </text:span>Security Groups, VPC, network policies.</text:p>
      <text:p text:style-name="Standard"><text:span text:style-name="T1">Continuous compliance</text:span> - logging/monitoring stack (ELK, CloudWatch, Zabbix) security scans и policy-as-code.</text:p>
      <text:p text:style-name="Standard"><text:span text:style-name="Strong_20_Emphasis">access to production systems?</text:span><text:span text:style-name="Strong_20_Emphasis"><text:span text:style-name="T15"> - <text:s/>should be limited, auditable, role-based, approved when needed, and protected with strong authentication.</text:span></text:span></text:p>
      <text:p text:style-name="Standard"/>
      <text:p text:style-name="P1">Kubernetes / OpenShift</text:p>
      <text:p text:style-name="P1">experience / responsibility</text:p>
      <text:p text:style-name="Standard">OpenShift and <text:span text:style-name="T27">K8S</text:span>, including deployments, troubleshooting, monitoring, resource usage, and high-load workloads</text:p>
      <text:p text:style-name="Standard"><text:span text:style-name="Strong_20_Emphasis">pod is not starting </text:span><text:span text:style-name="Strong_20_Emphasis"><text:span text:style-name="T15">- <text:s/>pod status, events, logs, image pull errors, configuration, secrets, resource limits, probes, node health, and scheduling issues.</text:span></text:span></text:p>
      <text:p text:style-name="Standard"><text:span text:style-name="Strong_20_Emphasis"><text:span text:style-name="T1">Readiness</text:span></text:span><text:span text:style-name="Strong_20_Emphasis"><text:span text:style-name="T15"> checks whether a pod can receive traffic / <text:s/></text:span></text:span><text:span text:style-name="Strong_20_Emphasis"><text:span text:style-name="T1">liveness</text:span></text:span><text:span text:style-name="Strong_20_Emphasis"><text:span text:style-name="T15"> checks whether the pod is healthy enough to keep running</text:span></text:span></text:p>
      <text:p text:style-name="Standard"><text:span text:style-name="Strong_20_Emphasis">high availability for workloads in Kubernetes</text:span><text:span text:style-name="Strong_20_Emphasis"><text:span text:style-name="T15"> - <text:s/>replicas, resource requests and limits, node distribution, monitoring, safe rollout strategy, and geo-redundancy for critical workloads.</text:span></text:span></text:p>
      <text:p text:style-name="Standard"><text:span text:style-name="Strong_20_Emphasis">use ingress and egress in Kubernetes</text:span><text:span text:style-name="Strong_20_Emphasis"><text:span text:style-name="T15"> - </text:span></text:span><text:span text:style-name="Strong_20_Emphasis">ingress</text:span><text:span text:style-name="Strong_20_Emphasis"><text:span text:style-name="T15"> to control external access to services inside the cluster, and </text:span></text:span><text:span text:style-name="Strong_20_Emphasis">egress</text:span><text:span text:style-name="Strong_20_Emphasis"><text:span text:style-name="T15"> to manage and restrict outbound traffic from workloads to external systems or other networks.</text:span></text:span></text:p>
      <text:p text:style-name="Standard"/>
      <text:p text:style-name="Standard"><text:span text:style-name="T1">Apache Flink</text:span> </text:p>
      <text:p text:style-name="Standard">jobs in production - job stability – performance - monitoring - Kafka <text:span text:style-name="T28">+</text:span> downstream systems <text:span text:style-name="T28">ClickHouse, PostgreSQL</text:span></text:p>
      <text:p text:style-name="Standard"/>
      <text:p text:style-name="Standard"/>
      <text:p text:style-name="Standard"/>
      <text:p text:style-name="P1"><text:soft-page-break/>troubleshoot streaming</text:p>
      <text:p text:style-name="Standard">analyzed Kafka lag<text:span text:style-name="T29">s</text:span> - Flink job metrics, downstream performance, logs, system changes to identify bottlenecks <text:span text:style-name="T29">+ </text:span>restore normal processing</text:p>
      <text:p text:style-name="Standard"/>
      <text:p text:style-name="Standard"><text:span text:style-name="T1">experience with ClickHouse</text:span></text:p>
      <text:p text:style-name="Standard">I supported ClickHouse as a downstream system for high-load data pipelines, including a large production cluster with about 130 hosts, focusing on performance, monitoring, and stability.</text:p>
      <text:p text:style-name="Standard"/>
      <text:p text:style-name="Standard">I have two children from my previous wife. We are now divorced.</text:p>
      <text:p text:style-name="Standard"/>
      <text:p text:style-name="Standard">I have a girlfriend and we are getting married within 3 months.</text:p>
      <text:p text:style-name="Standard">Will there be support for me and my spouse in obtaining a work visa?</text:p>
      <text:p text:style-name="Standard"/>
      <text:p text:style-name="Standard">Will there be support for relocation?</text:p>
      <text:p text:style-name="Standard"/>
      <text:p text:style-name="Standard">Will there be health insurance for me and my spouse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437in" fo:margin-bottom="0.422in" fo:margin-left="0.4925in" fo:margin-right="0.318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3T22:43:17.529322145</meta:creation-date>
    <dc:date>2026-05-04T14:24:30.554324984</dc:date>
    <meta:editing-duration>PT15H10M33S</meta:editing-duration>
    <meta:editing-cycles>89</meta:editing-cycles>
    <meta:generator>LibreOffice/25.8.6.2$Linux_X86_64 LibreOffice_project/580$Build-2</meta:generator>
    <meta:document-statistic meta:table-count="0" meta:image-count="0" meta:object-count="0" meta:page-count="3" meta:paragraph-count="67" meta:word-count="879" meta:character-count="6471" meta:non-whitespace-character-count="5638"/>
  </office:meta>
</office:document-meta>
</file>